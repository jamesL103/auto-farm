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1cm" fo:min-width="2.78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61cm" fo:min-width="4.827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3cm" fo:min-width="4.93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482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008cm" fo:min-width="4.721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61cm" fo:min-width="4.051cm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cm" fo:min-width="2.129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408cm" fo:min-width="3.23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38cm" fo:min-width="3.91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45cm" fo:min-width="2.288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9cm" fo:min-width="4.474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Arrowheads_20_15" draw:marker-end-width="0.3cm" draw:fill="none" draw:textarea-horizontal-align="right" draw:textarea-vertical-align="middle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38cm" fo:min-width="2.499cm" loext:decorative="false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114cm" fo:min-width="4.791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281cm" svg:height="1.481cm" svg:x="3.069cm" svg:y="1.799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5.327cm" svg:height="2.011cm" svg:x="2.046cm" svg:y="4.797cm">
          <text:p text:style-name="P2">Call Autofarm(width, height)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432cm" svg:height="1.693cm" svg:x="1.993cm" svg:y="9.031cm">
          <text:p text:style-name="P1">Deposit items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962cm" svg:height="3.386cm" svg:x="1.728cm" svg:y="11.676cm">
          <text:p text:style-name="P1">Fuel &lt; 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4.709cm" svg:y1="10.724cm" svg:x2="4.709cm" svg:y2="11.676cm" draw:start-shape="id1" draw:start-glue-point="2" draw:end-shape="id2" draw:end-glue-point="4" svg:d="M4709 10724v952" svg:viewBox="0 0 1 953">
          <text:p/>
        </draw:connector>
        <draw:connector draw:style-name="gr6" draw:text-style-name="P3" draw:layer="layout" draw:type="line" svg:x1="4.709cm" svg:y1="6.808cm" svg:x2="4.709cm" svg:y2="9.031cm" draw:start-shape="id3" draw:start-glue-point="2" draw:end-shape="id1" draw:end-glue-point="0" svg:d="M4709 6808v2223" svg:viewBox="0 0 1 2224">
          <text:p/>
        </draw:connector>
        <draw:connector draw:style-name="gr7" draw:text-style-name="P3" draw:layer="layout" draw:type="line" svg:x1="4.709cm" svg:y1="3.28cm" svg:x2="4.709cm" svg:y2="4.797cm" draw:start-shape="id4" draw:start-glue-point="2" draw:end-shape="id3" draw:end-glue-point="0" svg:d="M4709 3280v1517" svg:viewBox="0 0 1 1518">
          <text:p/>
        </draw:connector>
        <draw:custom-shape draw:style-name="gr8" draw:text-style-name="P1" xml:id="id5" draw:id="id5" draw:layer="layout" svg:width="5.221cm" svg:height="2.258cm" svg:x="2.099cm" svg:y="16.157cm">
          <text:p text:style-name="P1">Move to fuel chest, refuel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.709cm" svg:y1="15.062cm" svg:x2="4.709cm" svg:y2="16.157cm" draw:start-shape="id2" draw:start-glue-point="6" draw:end-shape="id5" draw:end-glue-point="0" svg:d="M4709 15062v1095" svg:viewBox="0 0 1 1096">
          <text:p text:style-name="P1">Yes</text:p>
        </draw:connector>
        <draw:custom-shape draw:style-name="gr10" draw:text-style-name="P1" xml:id="id6" draw:id="id6" draw:layer="layout" svg:width="4.551cm" svg:height="2.011cm" svg:x="2.434cm" svg:y="19.861cm">
          <text:p text:style-name="P1">wait(stop time)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4.709cm" svg:y1="18.415cm" svg:x2="4.709cm" svg:y2="19.861cm" draw:start-shape="id5" draw:start-glue-point="2" draw:end-shape="id6" draw:end-glue-point="0" svg:d="M4709 18415v1446" svg:viewBox="0 0 1 1447">
          <text:p/>
        </draw:connector>
        <draw:connector draw:style-name="gr12" draw:text-style-name="P3" draw:layer="layout" draw:type="lines" draw:line-skew="2.852cm 2.252cm" svg:x1="6.985cm" svg:y1="20.866cm" svg:x2="7.373cm" svg:y2="5.802cm" draw:start-shape="id6" draw:start-glue-point="1" draw:end-shape="id3" draw:end-glue-point="1" svg:d="M6985 20866h3352l-212-15064h-2752" svg:viewBox="0 0 3353 15065">
          <text:p/>
        </draw:connector>
        <draw:connector draw:style-name="gr13" draw:text-style-name="P3" draw:layer="layout" draw:type="lines" draw:line-skew="-0.227cm -0.932cm" svg:x1="1.728cm" svg:y1="13.369cm" svg:x2="2.434cm" svg:y2="20.866cm" draw:start-shape="id2" draw:start-glue-point="5" draw:end-shape="id6" draw:end-glue-point="3" svg:d="M1728 13369h-728v7497h1434" svg:viewBox="0 0 1435 7498">
          <text:p text:style-name="P1">no</text:p>
        </draw:connector>
      </draw:page>
      <draw:page draw:name="page2" draw:style-name="dp1" draw:master-page-name="Default">
        <draw:custom-shape draw:style-name="gr1" draw:text-style-name="P1" xml:id="id13" draw:id="id13" draw:layer="layout" svg:width="3.281cm" svg:height="1.481cm" svg:x="3.07cm" svg:y="1.8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3.281cm" svg:height="1.481cm" svg:x="2.999cm" svg:y="5.01cm">
          <text:p text:style-name="P1">wait(tim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6" draw:id="id16" draw:layer="layout" svg:width="5.257cm" svg:height="3.139cm" svg:x="1.975cm" svg:y="11.394cm">
          <text:p text:style-name="P1">Depot contains empty buck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5" draw:id="id15" draw:layer="layout" svg:width="3.739cm" svg:height="1.658cm" svg:x="2.612cm" svg:y="7.831cm">
          <text:p text:style-name="P1">Check fuel depot </text:p>
          <draw:enhanced-geometry svg:viewBox="0 0 21600 21600" draw:type="rectangle" draw:enhanced-path="M 0 0 L 21600 0 21600 21600 0 21600 0 0 Z N"/>
        </draw:custom-shape>
        <draw:custom-shape draw:style-name="gr16" draw:text-style-name="P1" xml:id="id7" draw:id="id7" draw:layer="layout" svg:width="4.41cm" svg:height="2.188cm" svg:x="2.503cm" svg:y="15.662cm">
          <text:p text:style-name="P1">Go to next cauldron</text:p>
          <draw:enhanced-geometry svg:viewBox="0 0 21600 21600" draw:type="rectangle" draw:enhanced-path="M 0 0 L 21600 0 21600 21600 0 21600 0 0 Z N"/>
        </draw:custom-shape>
        <draw:custom-shape draw:style-name="gr17" draw:text-style-name="P1" xml:id="id8" draw:id="id8" draw:layer="layout" svg:width="5.574cm" svg:height="2.787cm" svg:x="2.081cm" svg:y="18.662cm">
          <text:p text:style-name="P1">Cauldron has lav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9" draw:id="id9" draw:layer="layout" svg:width="4.974cm" svg:height="1.94cm" svg:x="3.105cm" svg:y="22.401cm">
          <text:p text:style-name="P1">Fill up bucket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5.574cm" svg:height="2.787cm" svg:x="2.681cm" svg:y="25.083cm">
          <text:p text:style-name="P1">Still have empty bucke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" draw:layer="layout" draw:type="line" svg:x1="4.708cm" svg:y1="17.85cm" svg:x2="4.868cm" svg:y2="18.662cm" draw:start-shape="id7" draw:start-glue-point="2" draw:end-shape="id8" draw:end-glue-point="4" svg:d="M4708 17850l160 812" svg:viewBox="0 0 161 813">
          <text:p/>
        </draw:connector>
        <draw:connector draw:style-name="gr20" draw:text-style-name="P3" draw:layer="layout" draw:type="line" svg:x1="4.868cm" svg:y1="21.449cm" svg:x2="5.592cm" svg:y2="22.401cm" draw:start-shape="id8" draw:start-glue-point="6" draw:end-shape="id9" draw:end-glue-point="0" svg:d="M4868 21449l724 952" svg:viewBox="0 0 725 953">
          <text:p/>
        </draw:connector>
        <draw:connector draw:style-name="gr21" draw:text-style-name="P3" draw:layer="layout" draw:type="line" svg:x1="5.592cm" svg:y1="24.341cm" svg:x2="5.468cm" svg:y2="25.083cm" draw:start-shape="id9" draw:start-glue-point="2" draw:end-shape="id10" draw:end-glue-point="4" svg:d="M5592 24341l-124 742" svg:viewBox="0 0 125 743">
          <text:p/>
        </draw:connector>
        <draw:connector draw:style-name="gr22" draw:text-style-name="P3" draw:layer="layout" draw:type="lines" svg:x1="7.655cm" svg:y1="20.055cm" svg:x2="12.982cm" svg:y2="18.133cm" draw:start-shape="id8" draw:start-glue-point="7" draw:end-shape="id11" draw:end-glue-point="6" svg:d="M7655 20055h502l4825-1421v-501" svg:viewBox="0 0 5328 1923">
          <text:p text:style-name="P1">no</text:p>
        </draw:connector>
        <draw:connector draw:style-name="gr23" draw:text-style-name="P5" draw:layer="layout" draw:type="lines" draw:line-skew="0cm 1.545cm" svg:x1="8.255cm" svg:y1="26.476cm" svg:x2="12.982cm" svg:y2="18.133cm" draw:start-shape="id10" draw:start-glue-point="7" draw:end-shape="id11" draw:end-glue-point="6" svg:d="M8255 26476h502l4225-6297v-2046" svg:viewBox="0 0 4728 8344">
          <text:p text:style-name="P4">yes</text:p>
        </draw:connector>
        <draw:custom-shape draw:style-name="gr24" draw:text-style-name="P1" xml:id="id11" draw:id="id11" draw:layer="layout" svg:width="5.997cm" svg:height="2.575cm" svg:x="9.983cm" svg:y="15.558cm">
          <text:p text:style-name="P1">Cauldrons lef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3" draw:layer="layout" draw:type="line" svg:x1="9.983cm" svg:y1="16.846cm" svg:x2="6.913cm" svg:y2="16.756cm" draw:start-shape="id11" draw:start-glue-point="5" draw:end-shape="id7" draw:end-glue-point="1" svg:d="M9983 16846l-3070-90" svg:viewBox="0 0 3071 91">
          <text:p text:style-name="P1">yes</text:p>
        </draw:connector>
        <draw:custom-shape draw:style-name="gr26" draw:text-style-name="P1" xml:id="id12" draw:id="id12" draw:layer="layout" svg:width="5.291cm" svg:height="2.364cm" svg:x="17.639cm" svg:y="16.016cm">
          <text:p text:style-name="P1">Return and place all full buckets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5.98cm" svg:y1="16.846cm" svg:x2="17.639cm" svg:y2="17.198cm" draw:start-shape="id11" draw:start-glue-point="7" draw:end-shape="id12" draw:end-glue-point="3" svg:d="M15980 16846l1659 352" svg:viewBox="0 0 1660 353">
          <text:p/>
        </draw:connector>
        <draw:connector draw:style-name="gr28" draw:text-style-name="P3" draw:layer="layout" draw:type="line" svg:x1="4.71cm" svg:y1="3.281cm" svg:x2="4.639cm" svg:y2="5.01cm" draw:start-shape="id13" draw:start-glue-point="2" draw:end-shape="id14" draw:end-glue-point="0" svg:d="M4710 3281l-71 1729" svg:viewBox="0 0 72 1730">
          <text:p/>
        </draw:connector>
        <draw:connector draw:style-name="gr29" draw:text-style-name="P3" draw:layer="layout" draw:type="line" svg:x1="4.639cm" svg:y1="6.491cm" svg:x2="4.481cm" svg:y2="7.831cm" draw:start-shape="id14" draw:start-glue-point="2" draw:end-shape="id15" draw:end-glue-point="0" svg:d="M4639 6491l-158 1340" svg:viewBox="0 0 159 1341">
          <text:p/>
        </draw:connector>
        <draw:connector draw:style-name="gr30" draw:text-style-name="P3" draw:layer="layout" draw:type="line" svg:x1="4.481cm" svg:y1="9.489cm" svg:x2="4.604cm" svg:y2="11.394cm" draw:start-shape="id15" draw:start-glue-point="2" draw:end-shape="id16" draw:end-glue-point="4" svg:d="M4481 9489l123 1905" svg:viewBox="0 0 124 1906">
          <text:p/>
        </draw:connector>
        <draw:connector draw:style-name="gr31" draw:text-style-name="P3" draw:layer="layout" draw:type="line" svg:x1="4.604cm" svg:y1="14.533cm" svg:x2="4.708cm" svg:y2="15.662cm" draw:start-shape="id16" draw:start-glue-point="6" draw:end-shape="id7" draw:end-glue-point="0" svg:d="M4604 14533l104 1129" svg:viewBox="0 0 105 11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0:22:38.729944100</meta:creation-date>
    <dc:date>2026-06-13T00:38:30.267128100</dc:date>
    <meta:editing-duration>PT15M46S</meta:editing-duration>
    <meta:editing-cycles>12</meta:editing-cycles>
    <meta:generator>LibreOffice/25.8.6.2$Windows_X86_64 LibreOffice_project/b4b39682cd9868fa725bc664aff94278d315bd04</meta:generator>
    <meta:document-statistic meta:object-count="34"/>
  </office:meta>
</office:document-meta>
</file>