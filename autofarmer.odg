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2cm" fo:min-width="3.542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91cm" fo:min-width="1.52cm" loext:decorative="false"/>
      <style:paragraph-properties style:writing-mode="lr-tb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118cm" fo:min-width="0cm" loext:decorative="false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42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4cm" fo:min-width="2.949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6cm" fo:min-width="3.469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427cm" fo:min-width="2.595cm" loext:decorative="false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8" draw:marker-end-width="0.3cm" draw:fill="none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708cm" fo:min-width="1.142cm" loext:decorative="false"/>
      <style:paragraph-properties style:writing-mode="lr-tb"/>
    </style:style>
    <style:style style:name="gr1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1.13cm" loext:decorative="false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876cm" fo:min-width="2.855cm" loext:decorative="false"/>
      <style:paragraph-properties style:writing-mode="lr-tb"/>
    </style:style>
    <style:style style:name="gr20" style:family="graphic" style:parent-style-name="objectwithoutfill">
      <style:graphic-properties draw:marker-end="Arrowheads_20_12" draw:marker-end-width="0.3cm" draw:fill="none" draw:textarea-vertical-align="middle" loext:decorative="false"/>
      <style:paragraph-properties style:writing-mode="lr-tb"/>
    </style:style>
    <style:style style:name="gr2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2.111cm" fo:min-width="3.492cm" loext:decorative="false"/>
      <style:paragraph-properties style:writing-mode="lr-tb"/>
    </style:style>
    <style:style style:name="gr23" style:family="graphic" style:parent-style-name="objectwithoutfill">
      <style:graphic-properties draw:marker-end="Arrowheads_20_14" draw:marker-end-width="0.3cm" draw:fill="non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2.632cm" fo:min-width="4.295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6" draw:marker-end-width="0.3cm" draw:fill="none" draw:textarea-vertical-align="middle" loext:decorative="false"/>
      <style:paragraph-properties style:writing-mode="lr-tb"/>
    </style:style>
    <style:style style:name="gr27" style:family="graphic" style:parent-style-name="objectwithoutfill">
      <style:graphic-properties draw:marker-end="Arrowheads_20_17" draw:marker-end-width="0.3cm" draw:fill="none" draw:textarea-vertical-align="midd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41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42cm" svg:height="1.702cm" svg:x="3.213cm" svg:y="1.701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4.039cm" svg:height="2.481cm" svg:x="3.646cm" svg:y="9.78cm">
          <text:p text:style-name="P1">ydist &lt; heigh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591cm" svg:height="0.52cm" svg:x="17.197cm" svg:y="8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553cm" svg:y1="8.457cm" svg:x2="17.553cm" svg:y2="3.378cm">
          <text:p/>
        </draw:line>
        <draw:line draw:style-name="gr5" draw:text-style-name="P3" draw:layer="layout" svg:x1="17.576cm" svg:y1="8.41cm" svg:x2="23.175cm" svg:y2="8.41cm">
          <text:p/>
        </draw:line>
        <draw:frame draw:style-name="gr6" draw:text-style-name="P4" draw:layer="layout" svg:width="0.874cm" svg:height="0.992cm" svg:x="23.223cm" svg:y="8.623cm">
          <draw:text-box>
            <text:p>x</text:p>
          </draw:text-box>
        </draw:frame>
        <draw:frame draw:style-name="gr6" draw:text-style-name="P4" draw:layer="layout" svg:width="0.874cm" svg:height="0.992cm" svg:x="16.562cm" svg:y="3.189cm">
          <draw:text-box>
            <text:p>y</text:p>
          </draw:text-box>
        </draw:frame>
        <draw:custom-shape draw:style-name="gr7" draw:text-style-name="P1" xml:id="id3" draw:id="id3" draw:layer="layout" svg:width="3.449cm" svg:height="1.89cm" svg:x="3.858cm" svg:y="6.732cm">
          <text:p text:style-name="P1">Check/harvest below</text:p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3.969cm" svg:height="1.276cm" svg:x="3.52cm" svg:y="4.111cm">
          <text:p text:style-name="P1">ydist = 0, x=0</text:p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3.095cm" svg:height="1.677cm" svg:x="4.176cm" svg:y="13.772cm">
          <text:p text:style-name="P1">move forward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5.234cm" svg:y1="3.403cm" svg:x2="5.504cm" svg:y2="4.111cm" draw:start-shape="id1" draw:start-glue-point="2" draw:end-shape="id2" draw:end-glue-point="0" svg:d="M5234 3403l270 708" svg:viewBox="0 0 271 709">
          <text:p/>
        </draw:connector>
        <draw:connector draw:style-name="gr11" draw:text-style-name="P3" draw:layer="layout" draw:type="line" svg:x1="5.504cm" svg:y1="5.387cm" svg:x2="5.582cm" svg:y2="6.732cm" draw:start-shape="id2" draw:start-glue-point="2" draw:end-shape="id3" draw:end-glue-point="0" svg:d="M5504 5387l78 1345" svg:viewBox="0 0 79 1346">
          <text:p/>
        </draw:connector>
        <draw:connector draw:style-name="gr12" draw:text-style-name="P3" draw:layer="layout" draw:type="line" svg:x1="5.582cm" svg:y1="8.622cm" svg:x2="5.666cm" svg:y2="9.78cm" draw:start-shape="id3" draw:start-glue-point="2" draw:end-shape="id4" draw:end-glue-point="4" svg:d="M5582 8622l84 1158" svg:viewBox="0 0 85 1159">
          <text:p/>
        </draw:connector>
        <draw:connector draw:style-name="gr13" draw:text-style-name="P3" draw:layer="layout" draw:type="line" svg:x1="5.666cm" svg:y1="12.261cm" svg:x2="5.723cm" svg:y2="13.772cm" draw:start-shape="id4" draw:start-glue-point="6" draw:end-shape="id5" draw:end-glue-point="0" svg:d="M5666 12261l57 1511" svg:viewBox="0 0 58 1512">
          <text:p text:style-name="P1">true</text:p>
        </draw:connector>
        <draw:connector draw:style-name="gr14" draw:text-style-name="P3" draw:layer="layout" draw:type="lines" draw:line-skew="-1.238cm -0.943cm" svg:x1="4.176cm" svg:y1="14.61cm" svg:x2="3.858cm" svg:y2="7.677cm" draw:start-shape="id5" draw:start-glue-point="3" draw:end-shape="id3" draw:end-glue-point="3" svg:d="M4176 14610h-1765l-23-6933h1470" svg:viewBox="0 0 1789 6934">
          <text:p/>
        </draw:connector>
        <draw:custom-shape draw:style-name="gr15" draw:text-style-name="P1" xml:id="id6" draw:id="id6" draw:layer="layout" svg:width="3.284cm" svg:height="1.914cm" svg:x="9.19cm" svg:y="10.088cm">
          <text:p text:style-name="P1">x &lt; width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3" draw:layer="layout" draw:type="line" svg:x1="7.685cm" svg:y1="11.021cm" svg:x2="9.19cm" svg:y2="11.045cm" draw:start-shape="id4" draw:start-glue-point="7" draw:end-shape="id6" draw:end-glue-point="5" svg:d="M7685 11021l1505 24" svg:viewBox="0 0 1506 25">
          <text:p/>
        </draw:connector>
        <draw:custom-shape draw:style-name="gr17" draw:text-style-name="P1" xml:id="id7" draw:id="id7" draw:layer="layout" svg:width="3.26cm" svg:height="2.031cm" svg:x="13.938cm" svg:y="10.041cm">
          <text:p text:style-name="P1">x is od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3" draw:layer="layout" draw:type="line" svg:x1="12.474cm" svg:y1="11.045cm" svg:x2="13.938cm" svg:y2="11.057cm" draw:start-shape="id6" draw:start-glue-point="7" draw:end-shape="id7" draw:end-glue-point="5" svg:d="M12474 11045l1464 12" svg:viewBox="0 0 1465 13">
          <text:p text:style-name="P1">true</text:p>
        </draw:connector>
        <draw:custom-shape draw:style-name="gr19" draw:text-style-name="P1" xml:id="id8" draw:id="id8" draw:layer="layout" svg:width="3.355cm" svg:height="2.126cm" svg:x="13.301cm" svg:y="2.67cm">
          <text:p text:style-name="P1">Turn right, move forward, turn right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line" svg:x1="15.568cm" svg:y1="10.041cm" svg:x2="14.978cm" svg:y2="4.796cm" draw:start-shape="id7" draw:start-glue-point="4" draw:end-shape="id8" draw:end-glue-point="2" svg:d="M15568 10041l-590-5245" svg:viewBox="0 0 591 5246">
          <text:p text:style-name="P1">true</text:p>
        </draw:connector>
        <draw:connector draw:style-name="gr21" draw:text-style-name="P3" draw:layer="layout" draw:type="line" svg:x1="13.301cm" svg:y1="3.733cm" svg:x2="7.307cm" svg:y2="7.677cm" draw:start-shape="id8" draw:start-glue-point="3" draw:end-shape="id3" draw:end-glue-point="1" svg:d="M13301 3733l-5994 3944" svg:viewBox="0 0 5995 3945">
          <text:p/>
        </draw:connector>
        <draw:custom-shape draw:style-name="gr22" draw:text-style-name="P1" xml:id="id9" draw:id="id9" draw:layer="layout" svg:width="3.992cm" svg:height="2.361cm" svg:x="9.568cm" svg:y="6.664cm">
          <text:p text:style-name="P1">Turn left, move forward, turn left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5.568cm" svg:y1="10.041cm" svg:x2="13.56cm" svg:y2="7.844cm" draw:start-shape="id7" draw:start-glue-point="4" draw:end-shape="id9" draw:end-glue-point="1" svg:d="M15568 10041l-2008-2197" svg:viewBox="0 0 2009 2198">
          <text:p text:style-name="P1">false</text:p>
        </draw:connector>
        <draw:connector draw:style-name="gr24" draw:text-style-name="P3" draw:layer="layout" draw:type="line" svg:x1="9.568cm" svg:y1="7.844cm" svg:x2="7.307cm" svg:y2="7.677cm" draw:start-shape="id9" draw:start-glue-point="3" draw:end-shape="id3" draw:end-glue-point="1" svg:d="M9568 7844l-2261-167" svg:viewBox="0 0 2262 168">
          <text:p/>
        </draw:connector>
        <draw:custom-shape draw:style-name="gr17" draw:text-style-name="P1" xml:id="id10" draw:id="id10" draw:layer="layout" svg:width="3.26cm" svg:height="2.031cm" svg:x="9.166cm" svg:y="14.293cm">
          <text:p text:style-name="P1">x is od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3" draw:layer="layout" draw:type="line" svg:x1="10.832cm" svg:y1="12.002cm" svg:x2="10.796cm" svg:y2="14.293cm" draw:start-shape="id6" draw:start-glue-point="6" draw:end-shape="id10" draw:end-glue-point="4" svg:d="M10832 12002l-36 2291" svg:viewBox="0 0 37 2292">
          <text:p text:style-name="P1">false</text:p>
        </draw:connector>
        <draw:custom-shape draw:style-name="gr25" draw:text-style-name="P1" xml:id="id11" draw:id="id11" draw:layer="layout" svg:width="4.795cm" svg:height="2.882cm" svg:x="8.104cm" svg:y="17.529cm">
          <text:p text:style-name="P1">Turn left, move forward width times, turn left, move forward height times, turn right <text:s/>x2</text:p>
          <draw:enhanced-geometry svg:viewBox="0 0 21600 21600" draw:type="rectangle" draw:enhanced-path="M 0 0 L 21600 0 21600 21600 0 21600 0 0 Z N"/>
        </draw:custom-shape>
        <draw:custom-shape draw:style-name="gr25" draw:text-style-name="P1" xml:id="id12" draw:id="id12" draw:layer="layout" svg:width="4.795cm" svg:height="2.882cm" svg:x="14.364cm" svg:y="17.364cm">
          <text:p text:style-name="P1">Turn right, move forward width times, turn right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draw:type="line" svg:x1="10.796cm" svg:y1="16.324cm" svg:x2="10.501cm" svg:y2="17.529cm" draw:start-shape="id10" draw:start-glue-point="6" draw:end-shape="id11" draw:end-glue-point="0" svg:d="M10796 16324l-295 1205" svg:viewBox="0 0 296 1206">
          <text:p text:style-name="P1">true</text:p>
        </draw:connector>
        <draw:connector draw:style-name="gr27" draw:text-style-name="P3" draw:layer="layout" draw:type="line" svg:x1="10.796cm" svg:y1="16.324cm" svg:x2="16.761cm" svg:y2="17.364cm" draw:start-shape="id10" draw:start-glue-point="6" draw:end-shape="id12" draw:end-glue-point="0" svg:d="M10796 16324l5965 1040" svg:viewBox="0 0 5966 1041">
          <text:p text:style-name="P1">false</text:p>
        </draw:connector>
        <draw:frame draw:style-name="gr28" draw:text-style-name="P4" draw:layer="layout" svg:width="2.976cm" svg:height="0.725cm" svg:x="18.923cm" svg:y="8.859cm">
          <draw:text-box>
            <text:p>width</text:p>
          </draw:text-box>
        </draw:frame>
        <draw:frame draw:style-name="gr29" draw:text-style-name="P4" draw:layer="layout" svg:width="2.056cm" svg:height="0.772cm" svg:x="15.852cm" svg:y="5.694cm">
          <draw:text-box>
            <text:p>heigh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09T15:50:23.401449800</meta:creation-date>
    <dc:date>2026-06-09T16:24:46.970566900</dc:date>
    <meta:editing-duration>PT22M16S</meta:editing-duration>
    <meta:editing-cycles>5</meta:editing-cycles>
    <meta:generator>LibreOffice/25.8.6.2$Windows_X86_64 LibreOffice_project/b4b39682cd9868fa725bc664aff94278d315bd04</meta:generator>
    <meta:document-statistic meta:object-count="33"/>
  </office:meta>
</office:document-meta>
</file>