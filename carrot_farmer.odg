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1cm" fo:min-width="2.78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61cm" fo:min-width="4.82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43cm" fo:min-width="4.93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482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008cm" fo:min-width="4.72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61cm" fo:min-width="4.05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7" style:family="graphic" style:parent-style-name="standard">
      <style:graphic-properties draw:fill="solid" draw:fill-color="#000000" draw:textarea-vertical-align="middle" draw:auto-grow-height="false" fo:min-height="0cm" fo:min-width="0cm" loext:decorative="false"/>
    </style:style>
    <style:style style:name="gr1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195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50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07cm" loext:decorative="false"/>
      <style:paragraph-properties style:writing-mode="lr-tb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79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229cm" fo:min-width="0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527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927cm" fo:min-width="4.959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.228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53cm" fo:min-width="4.557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759cm" fo:min-width="4.289cm" loext:decorative="false"/>
      <style:paragraph-properties style:writing-mode="lr-tb"/>
    </style:style>
    <style:style style:name="gr3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1.32cm" fo:min-width="2.129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408cm" fo:min-width="3.239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938cm" fo:min-width="3.91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145cm" fo:min-width="2.288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69cm" fo:min-width="4.474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14" draw:marker-end-width="0.3cm" draw:fill="none" draw:textarea-vertical-align="middle" loext:decorative="false"/>
      <style:paragraph-properties style:writing-mode="lr-tb"/>
    </style:style>
    <style:style style:name="gr41" style:family="graphic" style:parent-style-name="objectwithoutfill">
      <style:graphic-properties draw:marker-end="Arrowheads_20_15" draw:marker-end-width="0.3cm" draw:fill="none" draw:textarea-horizontal-align="right" draw:textarea-vertical-align="middle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038cm" fo:min-width="2.499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2.114cm" fo:min-width="4.791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50" style:family="graphic" style:parent-style-name="standard">
      <style:graphic-properties draw:textarea-horizontal-align="justify" draw:textarea-vertical-align="middle" draw:auto-grow-height="false" fo:min-height="0.984cm" fo:min-width="0.594cm" loext:decorative="false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.324cm" fo:min-width="0.074cm" loext:decorative="false"/>
    </style:style>
    <style:style style:name="gr52" style:family="graphic" style:parent-style-name="standard">
      <style:graphic-properties draw:textarea-horizontal-align="justify" draw:textarea-vertical-align="middle" draw:auto-grow-height="false" fo:min-height="0.498cm" fo:min-width="0.248cm" loext:decorative="false"/>
    </style:style>
    <style:style style:name="gr53" style:family="graphic" style:parent-style-name="standard">
      <style:graphic-properties draw:textarea-vertical-align="middle" draw:auto-grow-height="false" fo:min-height="0.457cm" fo:min-width="0.207cm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879cm" loext:decorative="false"/>
      <style:paragraph-properties style:writing-mode="lr-tb"/>
    </style:style>
    <style:style style:name="gr55" style:family="graphic" style:parent-style-name="standard">
      <style:graphic-properties draw:fill="none" loext:fill-use-slide-background="false" draw:textarea-horizontal-align="justify" draw:textarea-vertical-align="middle" draw:auto-grow-height="false" fo:min-height="0.984cm" fo:min-width="0.594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1.752cm" loext:decorative="false"/>
      <style:paragraph-properties style:writing-mode="lr-tb"/>
    </style:style>
    <style:style style:name="gr58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59" style:family="graphic" style:parent-style-name="standard">
      <style:graphic-properties draw:textarea-horizontal-align="justify" draw:textarea-vertical-align="middle" draw:auto-grow-height="false" fo:min-height="1.767cm" fo:min-width="3.767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04cm" fo:min-width="1.634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404cm" fo:min-width="3.402cm" style:writing-mode="lr-tb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.999cm" fo:min-width="4.031cm" style:writing-mode="lr-tb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9cm" fo:min-width="3.832cm" style:writing-mode="lr-tb" loext:decorative="false"/>
      <style:paragraph-properties style:writing-mode="lr-tb"/>
    </style:style>
    <style:style style:name="gr6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27" draw:marker-end-width="0.3cm" draw:fill="none" draw:textarea-vertical-align="middle" loext:decorative="false"/>
      <style:paragraph-properties style:writing-mode="lr-tb"/>
    </style:style>
    <style:style style:name="gr67" style:family="graphic" style:parent-style-name="objectwithoutfill">
      <style:graphic-properties draw:marker-end="Arrowheads_20_28" draw:marker-end-width="0.3cm" draw:fill="none" draw:textarea-vertical-align="middle" loext:decorative="false"/>
      <style:paragraph-properties style:writing-mode="lr-tb"/>
    </style:style>
    <style:style style:name="gr68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281cm" svg:height="1.481cm" svg:x="3.069cm" svg:y="1.799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5.327cm" svg:height="2.011cm" svg:x="2.046cm" svg:y="4.797cm">
          <text:p text:style-name="P3">Call Autofarm(width, height)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432cm" svg:height="1.693cm" svg:x="1.993cm" svg:y="9.031cm">
          <text:p text:style-name="P1">Deposit carrots, assuming only carrots in inventory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.962cm" svg:height="3.386cm" svg:x="1.728cm" svg:y="11.676cm">
          <text:p text:style-name="P1">Fuel &lt; threshol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4.709cm" svg:y1="10.724cm" svg:x2="4.709cm" svg:y2="11.676cm" draw:start-shape="id1" draw:start-glue-point="2" draw:end-shape="id2" draw:end-glue-point="4" svg:d="M4709 10724v952" svg:viewBox="0 0 1 953">
          <text:p/>
        </draw:connector>
        <draw:connector draw:style-name="gr6" draw:text-style-name="P4" draw:layer="layout" draw:type="line" svg:x1="4.709cm" svg:y1="6.808cm" svg:x2="4.709cm" svg:y2="9.031cm" draw:start-shape="id3" draw:start-glue-point="2" draw:end-shape="id1" draw:end-glue-point="0" svg:d="M4709 6808v2223" svg:viewBox="0 0 1 2224">
          <text:p/>
        </draw:connector>
        <draw:connector draw:style-name="gr7" draw:text-style-name="P4" draw:layer="layout" draw:type="line" svg:x1="4.709cm" svg:y1="3.28cm" svg:x2="4.709cm" svg:y2="4.797cm" draw:start-shape="id4" draw:start-glue-point="2" draw:end-shape="id3" draw:end-glue-point="0" svg:d="M4709 3280v1517" svg:viewBox="0 0 1 1518">
          <text:p/>
        </draw:connector>
        <draw:custom-shape draw:style-name="gr8" draw:text-style-name="P2" xml:id="id5" draw:id="id5" draw:layer="layout" svg:width="5.221cm" svg:height="2.258cm" svg:x="2.099cm" svg:y="16.157cm">
          <text:p text:style-name="P1">refuel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4.709cm" svg:y1="15.062cm" svg:x2="4.709cm" svg:y2="16.157cm" draw:start-shape="id2" draw:start-glue-point="6" draw:end-shape="id5" draw:end-glue-point="0" svg:d="M4709 15062v1095" svg:viewBox="0 0 1 1096">
          <text:p text:style-name="P1">Yes</text:p>
        </draw:connector>
        <draw:custom-shape draw:style-name="gr10" draw:text-style-name="P2" xml:id="id6" draw:id="id6" draw:layer="layout" svg:width="4.551cm" svg:height="2.011cm" svg:x="2.434cm" svg:y="19.861cm">
          <text:p text:style-name="P1">wait(stop time)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4.709cm" svg:y1="18.415cm" svg:x2="4.709cm" svg:y2="19.861cm" draw:start-shape="id5" draw:start-glue-point="2" draw:end-shape="id6" draw:end-glue-point="0" svg:d="M4709 18415v1446" svg:viewBox="0 0 1 1447">
          <text:p/>
        </draw:connector>
        <draw:connector draw:style-name="gr12" draw:text-style-name="P4" draw:layer="layout" draw:type="lines" draw:line-skew="2.852cm 2.252cm" svg:x1="6.985cm" svg:y1="20.866cm" svg:x2="7.373cm" svg:y2="5.802cm" draw:start-shape="id6" draw:start-glue-point="1" draw:end-shape="id3" draw:end-glue-point="1" svg:d="M6985 20866h3352l-212-15064h-2752" svg:viewBox="0 0 3353 15065">
          <text:p/>
        </draw:connector>
        <draw:connector draw:style-name="gr13" draw:text-style-name="P4" draw:layer="layout" draw:type="lines" draw:line-skew="-0.227cm -0.932cm" svg:x1="1.728cm" svg:y1="13.369cm" svg:x2="2.434cm" svg:y2="20.866cm" draw:start-shape="id2" draw:start-glue-point="5" draw:end-shape="id6" draw:end-glue-point="3" svg:d="M1728 13369h-728v7497h1434" svg:viewBox="0 0 1435 7498">
          <text:p text:style-name="P1">no</text:p>
        </draw:connector>
        <draw:line draw:style-name="gr14" draw:text-style-name="P4" draw:layer="layout" svg:x1="13.124cm" svg:y1="7.902cm" svg:x2="18.204cm" svg:y2="7.902cm">
          <text:p text:style-name="P1"/>
          <text:p text:style-name="P1"/>
          <text:p text:style-name="P1">Width</text:p>
        </draw:line>
        <draw:line draw:style-name="gr15" draw:text-style-name="P4" draw:layer="layout" svg:x1="13.158cm" svg:y1="7.866cm" svg:x2="13.158cm" svg:y2="2.292cm">
          <text:p/>
        </draw:line>
        <draw:frame draw:style-name="gr16" draw:text-style-name="P5" draw:layer="layout" svg:width="1.764cm" svg:height="0.952cm" draw:transform="rotate (1.5707963267949) translate (11.8cm 6.261cm)">
          <draw:text-box>
            <text:p>Height</text:p>
          </draw:text-box>
        </draw:frame>
        <draw:custom-shape draw:style-name="gr17" draw:text-style-name="P6" draw:layer="layout" svg:width="0.252cm" svg:height="0.252cm" svg:x="13.035cm" svg:y="7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163cm" svg:y1="7.822cm" svg:x2="13.163cm" svg:y2="5.92cm">
          <text:p/>
        </draw:line>
        <draw:custom-shape draw:style-name="gr19" draw:text-style-name="P1" draw:layer="layout" svg:width="0.434cm" svg:height="0.445cm" svg:x="12.404cm" svg:y="7.63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1.831cm" svg:height="0.752cm" svg:x="11.81cm" svg:y="8.361cm">
          <draw:text-box>
            <text:p>Chests</text:p>
          </draw:text-box>
        </draw:frame>
        <draw:frame draw:style-name="gr21" draw:text-style-name="P5" draw:layer="layout" svg:width="3.556cm" svg:height="0.857cm" svg:x="13.144cm" svg:y="1.366cm">
          <draw:text-box>
            <text:p>Top View</text:p>
          </draw:text-box>
        </draw:frame>
        <draw:line draw:style-name="gr14" draw:text-style-name="P4" draw:layer="layout" svg:x1="13.56cm" svg:y1="12.386cm" svg:x2="20.025cm" svg:y2="12.386cm">
          <text:p text:style-name="P1"/>
          <text:p text:style-name="P1"/>
          <text:p text:style-name="P1">Width</text:p>
        </draw:line>
        <draw:custom-shape draw:style-name="gr22" draw:text-style-name="P6" draw:layer="layout" svg:width="0.463cm" svg:height="0.463cm" svg:x="13.412cm" svg:y="1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479cm" svg:height="0.479cm" svg:x="12.75cm" svg:y="11.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479cm" svg:height="0.479cm" svg:x="13.411cm" svg:y="10.894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4.531cm" svg:height="0.725cm" svg:x="13.758cm" svg:y="9.938cm">
          <draw:text-box>
            <text:p>Front View</text:p>
          </draw:text-box>
        </draw:frame>
        <draw:frame draw:style-name="gr25" draw:text-style-name="P5" draw:layer="layout" svg:width="2cm" svg:height="0.777cm" svg:x="10.666cm" svg:y="11.493cm">
          <draw:text-box>
            <text:p>Storage</text:p>
          </draw:text-box>
        </draw:frame>
        <draw:frame draw:style-name="gr25" draw:text-style-name="P5" draw:layer="layout" svg:width="2cm" svg:height="0.777cm" svg:x="11.195cm" svg:y="10.662cm">
          <draw:text-box>
            <text:p>Fuel</text:p>
          </draw:text-box>
        </draw:frame>
        <draw:custom-shape draw:style-name="gr26" draw:text-style-name="P2" xml:id="id7" draw:id="id7" draw:layer="layout" svg:width="5.459cm" svg:height="2.177cm" svg:x="23.143cm" svg:y="1.641cm">
          <text:p text:style-name="P1">refuel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draw:type="line" svg:x1="25.873cm" svg:y1="3.818cm" svg:x2="25.905cm" svg:y2="8.071cm" draw:start-shape="id7" draw:start-glue-point="6" draw:end-shape="id8" draw:end-glue-point="4" svg:d="M25873 3818l32 4253" svg:viewBox="0 0 33 4254">
          <text:p/>
        </draw:connector>
        <draw:frame draw:style-name="gr28" draw:text-style-name="P5" draw:layer="layout" svg:width="5.894cm" svg:height="3.569cm" svg:x="29.607cm" svg:y="1.909cm">
          <draw:text-box>
            <text:p>Precondition: </text:p>
            <text:p/>
            <text:list text:style-name="L1">
              <text:list-item>
                <text:p>assume fuel items are in the first 4 slots of the chest</text:p>
              </text:list-item>
              <text:list-item>
                <text:p>Turtle’s inventory is empty</text:p>
              </text:list-item>
            </text:list>
          </draw:text-box>
        </draw:frame>
        <draw:custom-shape draw:style-name="gr29" draw:text-style-name="P1" xml:id="id8" draw:id="id8" draw:layer="layout" svg:width="5.057cm" svg:height="2.78cm" svg:x="23.376cm" svg:y="8.071cm">
          <text:p text:style-name="P1">Get first 4 items from top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" xml:id="id9" draw:id="id9" draw:layer="layout" svg:width="4.789cm" svg:height="2.009cm" svg:x="23.846cm" svg:y="13.062cm">
          <text:p text:style-name="P1">Refuel 4 times, return items to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4" draw:layer="layout" draw:type="line" svg:x1="25.905cm" svg:y1="10.851cm" svg:x2="26.241cm" svg:y2="13.062cm" draw:start-shape="id8" draw:start-glue-point="6" draw:end-shape="id9" draw:end-glue-point="4" svg:d="M25905 10851l336 2211" svg:viewBox="0 0 337 2212">
          <text:p/>
        </draw:connector>
      </draw:page>
      <draw:page draw:name="page2" draw:style-name="dp1" draw:master-page-name="Default">
        <draw:custom-shape draw:style-name="gr1" draw:text-style-name="P2" xml:id="id16" draw:id="id16" draw:layer="layout" svg:width="3.281cm" svg:height="1.481cm" svg:x="3.07cm" svg:y="1.8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3.281cm" svg:height="1.481cm" svg:x="2.999cm" svg:y="5.01cm">
          <text:p text:style-name="P1">wait(tim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19" draw:id="id19" draw:layer="layout" svg:width="5.257cm" svg:height="3.139cm" svg:x="1.975cm" svg:y="11.394cm">
          <text:p text:style-name="P1">Depot contains empty buck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" xml:id="id18" draw:id="id18" draw:layer="layout" svg:width="3.739cm" svg:height="1.658cm" svg:x="2.612cm" svg:y="7.831cm">
          <text:p text:style-name="P1">Check fuel depot </text:p>
          <draw:enhanced-geometry svg:viewBox="0 0 21600 21600" draw:type="rectangle" draw:enhanced-path="M 0 0 L 21600 0 21600 21600 0 21600 0 0 Z N"/>
        </draw:custom-shape>
        <draw:custom-shape draw:style-name="gr34" draw:text-style-name="P2" xml:id="id10" draw:id="id10" draw:layer="layout" svg:width="4.41cm" svg:height="2.188cm" svg:x="2.503cm" svg:y="15.662cm">
          <text:p text:style-name="P1">Go to next cauldron</text:p>
          <draw:enhanced-geometry svg:viewBox="0 0 21600 21600" draw:type="rectangle" draw:enhanced-path="M 0 0 L 21600 0 21600 21600 0 21600 0 0 Z N"/>
        </draw:custom-shape>
        <draw:custom-shape draw:style-name="gr35" draw:text-style-name="P2" xml:id="id11" draw:id="id11" draw:layer="layout" svg:width="5.574cm" svg:height="2.787cm" svg:x="2.081cm" svg:y="18.662cm">
          <text:p text:style-name="P1">Cauldron has lav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12" draw:id="id12" draw:layer="layout" svg:width="4.974cm" svg:height="1.94cm" svg:x="3.105cm" svg:y="22.401cm">
          <text:p text:style-name="P1">Fill up bucket</text:p>
          <draw:enhanced-geometry svg:viewBox="0 0 21600 21600" draw:type="rectangle" draw:enhanced-path="M 0 0 L 21600 0 21600 21600 0 21600 0 0 Z N"/>
        </draw:custom-shape>
        <draw:custom-shape draw:style-name="gr35" draw:text-style-name="P2" xml:id="id13" draw:id="id13" draw:layer="layout" svg:width="5.574cm" svg:height="2.787cm" svg:x="2.681cm" svg:y="25.083cm">
          <text:p text:style-name="P1">Still have empty bucke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4" draw:layer="layout" draw:type="line" svg:x1="4.708cm" svg:y1="17.85cm" svg:x2="4.868cm" svg:y2="18.662cm" draw:start-shape="id10" draw:start-glue-point="2" draw:end-shape="id11" draw:end-glue-point="4" svg:d="M4708 17850l160 812" svg:viewBox="0 0 161 813">
          <text:p/>
        </draw:connector>
        <draw:connector draw:style-name="gr38" draw:text-style-name="P4" draw:layer="layout" draw:type="line" svg:x1="4.868cm" svg:y1="21.449cm" svg:x2="5.592cm" svg:y2="22.401cm" draw:start-shape="id11" draw:start-glue-point="6" draw:end-shape="id12" draw:end-glue-point="0" svg:d="M4868 21449l724 952" svg:viewBox="0 0 725 953">
          <text:p/>
        </draw:connector>
        <draw:connector draw:style-name="gr39" draw:text-style-name="P4" draw:layer="layout" draw:type="line" svg:x1="5.592cm" svg:y1="24.341cm" svg:x2="5.468cm" svg:y2="25.083cm" draw:start-shape="id12" draw:start-glue-point="2" draw:end-shape="id13" draw:end-glue-point="4" svg:d="M5592 24341l-124 742" svg:viewBox="0 0 125 743">
          <text:p/>
        </draw:connector>
        <draw:connector draw:style-name="gr40" draw:text-style-name="P4" draw:layer="layout" draw:type="lines" svg:x1="7.655cm" svg:y1="20.055cm" svg:x2="12.982cm" svg:y2="18.133cm" draw:start-shape="id11" draw:start-glue-point="7" draw:end-shape="id14" draw:end-glue-point="6" svg:d="M7655 20055h502l4825-1421v-501" svg:viewBox="0 0 5328 1923">
          <text:p text:style-name="P1">no</text:p>
        </draw:connector>
        <draw:connector draw:style-name="gr41" draw:text-style-name="P8" draw:layer="layout" draw:type="lines" draw:line-skew="0cm 1.545cm" svg:x1="8.255cm" svg:y1="26.476cm" svg:x2="12.982cm" svg:y2="18.133cm" draw:start-shape="id13" draw:start-glue-point="7" draw:end-shape="id14" draw:end-glue-point="6" svg:d="M8255 26476h502l4225-6297v-2046" svg:viewBox="0 0 4728 8344">
          <text:p text:style-name="P7">yes</text:p>
        </draw:connector>
        <draw:custom-shape draw:style-name="gr42" draw:text-style-name="P2" xml:id="id14" draw:id="id14" draw:layer="layout" svg:width="5.997cm" svg:height="2.575cm" svg:x="9.983cm" svg:y="15.558cm">
          <text:p text:style-name="P1">Cauldrons lef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4" draw:layer="layout" draw:type="line" svg:x1="9.983cm" svg:y1="16.846cm" svg:x2="6.913cm" svg:y2="16.756cm" draw:start-shape="id14" draw:start-glue-point="5" draw:end-shape="id10" draw:end-glue-point="1" svg:d="M9983 16846l-3070-90" svg:viewBox="0 0 3071 91">
          <text:p text:style-name="P1">yes</text:p>
        </draw:connector>
        <draw:custom-shape draw:style-name="gr44" draw:text-style-name="P2" xml:id="id15" draw:id="id15" draw:layer="layout" svg:width="5.291cm" svg:height="2.364cm" svg:x="17.639cm" svg:y="16.016cm">
          <text:p text:style-name="P1">Return and place all full buckets</text:p>
          <draw:enhanced-geometry svg:viewBox="0 0 21600 21600" draw:type="rectangle" draw:enhanced-path="M 0 0 L 21600 0 21600 21600 0 21600 0 0 Z N"/>
        </draw:custom-shape>
        <draw:connector draw:style-name="gr45" draw:text-style-name="P4" draw:layer="layout" draw:type="line" svg:x1="15.98cm" svg:y1="16.846cm" svg:x2="17.639cm" svg:y2="17.198cm" draw:start-shape="id14" draw:start-glue-point="7" draw:end-shape="id15" draw:end-glue-point="3" svg:d="M15980 16846l1659 352" svg:viewBox="0 0 1660 353">
          <text:p/>
        </draw:connector>
        <draw:connector draw:style-name="gr46" draw:text-style-name="P4" draw:layer="layout" draw:type="line" svg:x1="4.71cm" svg:y1="3.281cm" svg:x2="4.639cm" svg:y2="5.01cm" draw:start-shape="id16" draw:start-glue-point="2" draw:end-shape="id17" draw:end-glue-point="0" svg:d="M4710 3281l-71 1729" svg:viewBox="0 0 72 1730">
          <text:p/>
        </draw:connector>
        <draw:connector draw:style-name="gr47" draw:text-style-name="P4" draw:layer="layout" draw:type="line" svg:x1="4.639cm" svg:y1="6.491cm" svg:x2="4.481cm" svg:y2="7.831cm" draw:start-shape="id17" draw:start-glue-point="2" draw:end-shape="id18" draw:end-glue-point="0" svg:d="M4639 6491l-158 1340" svg:viewBox="0 0 159 1341">
          <text:p/>
        </draw:connector>
        <draw:connector draw:style-name="gr48" draw:text-style-name="P4" draw:layer="layout" draw:type="line" svg:x1="4.481cm" svg:y1="9.489cm" svg:x2="4.604cm" svg:y2="11.394cm" draw:start-shape="id18" draw:start-glue-point="2" draw:end-shape="id19" draw:end-glue-point="4" svg:d="M4481 9489l123 1905" svg:viewBox="0 0 124 1906">
          <text:p/>
        </draw:connector>
        <draw:connector draw:style-name="gr49" draw:text-style-name="P4" draw:layer="layout" draw:type="line" svg:x1="4.604cm" svg:y1="14.533cm" svg:x2="4.708cm" svg:y2="15.662cm" draw:start-shape="id19" draw:start-glue-point="6" draw:end-shape="id10" draw:end-glue-point="0" svg:d="M4604 14533l104 1129" svg:viewBox="0 0 105 1130">
          <text:p/>
        </draw:connector>
        <draw:custom-shape draw:style-name="gr50" draw:text-style-name="P1" draw:layer="layout" svg:width="1.094cm" svg:height="1.234cm" svg:x="30.586cm" svg:y="3.3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0.812cm" svg:height="0.812cm" svg:x="30.763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8cm" svg:height="1.058cm" svg:x="29.17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8cm" svg:height="1.058cm" svg:x="27.87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8cm" svg:height="1.058cm" svg:x="26.56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0.999cm" svg:height="0.999cm" svg:x="29.17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8cm" svg:height="1.058cm" svg:x="27.975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8cm" svg:height="1.058cm" svg:x="26.599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3.704cm" svg:height="1.129cm" svg:x="26.247cm" svg:y="1.376cm">
          <draw:text-box>
            <text:p>Top View</text:p>
          </draw:text-box>
        </draw:frame>
        <draw:frame draw:style-name="gr24" draw:text-style-name="P5" draw:layer="layout" svg:width="0.67cm" svg:height="0.725cm" svg:x="28.081cm" svg:y="7.903cm">
          <draw:text-box>
            <text:p>x</text:p>
          </draw:text-box>
        </draw:frame>
        <draw:frame draw:style-name="gr24" draw:text-style-name="P5" draw:layer="layout" svg:width="2.646cm" svg:height="0.725cm" svg:x="27.129cm" svg:y="6.809cm">
          <draw:text-box>
            <text:p>Cauldrons</text:p>
          </draw:text-box>
        </draw:frame>
        <draw:custom-shape draw:style-name="gr55" draw:text-style-name="P4" draw:layer="layout" svg:width="1.094cm" svg:height="1.234cm" svg:x="30.646cm" svg:y="4.807cm">
          <text:p/>
          <draw:enhanced-geometry svg:viewBox="0 0 21600 21600" draw:type="rectangle" draw:enhanced-path="M 0 0 L 21600 0 21600 21600 0 21600 0 0 Z N"/>
        </draw:custom-shape>
        <draw:frame draw:style-name="gr56" draw:text-style-name="P5" draw:layer="layout" svg:width="2.328cm" svg:height="1.199cm" svg:x="32.385cm" svg:y="3.625cm">
          <draw:text-box>
            <text:p>Fuel depot</text:p>
          </draw:text-box>
        </draw:frame>
        <draw:frame draw:style-name="gr57" draw:text-style-name="P5" draw:layer="layout" svg:width="2.384cm" svg:height="2.002cm" svg:x="32.474cm" svg:y="5.127cm">
          <draw:text-box>
            <text:p>Buffer chest (above)</text:p>
          </draw:text-box>
        </draw:frame>
        <draw:line draw:style-name="gr58" draw:text-style-name="P4" draw:layer="layout" svg:x1="31.177cm" svg:y1="4.939cm" svg:x2="31.177cm" svg:y2="1.543cm">
          <text:p/>
        </draw:line>
        <draw:custom-shape draw:style-name="gr59" draw:text-style-name="P2" xml:id="id20" draw:id="id20" draw:layer="layout" svg:width="4.267cm" svg:height="2.017cm" svg:x="27.318cm" svg:y="9.955cm">
          <text:p text:style-name="P1">retur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2" xml:id="id22" draw:id="id22" draw:layer="layout" svg:width="4.266cm" svg:height="2.579cm" svg:x="27.253cm" svg:y="15.544cm">
          <text:p text:style-name="P1">Chest in front and abo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1" draw:text-style-name="P2" xml:id="id21" draw:id="id21" draw:layer="layout" svg:width="3.902cm" svg:height="1.654cm" svg:x="27.484cm" svg:y="12.766cm">
          <text:p text:style-name="P1">Turn r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2" xml:id="id24" draw:id="id24" draw:layer="layout" svg:width="4.531cm" svg:height="2.249cm" svg:x="27.153cm" svg:y="19.58cm">
          <text:p text:style-name="P1">Turn lef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2" xml:id="id23" draw:id="id23" draw:layer="layout" svg:width="4.332cm" svg:height="2.15cm" svg:x="34.595cm" svg:y="15.744cm">
          <text:p text:style-name="P1">Turn right, move forward, turn lef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4" draw:layer="layout" draw:type="line" svg:x1="29.452cm" svg:y1="11.972cm" svg:x2="29.435cm" svg:y2="12.766cm" draw:start-shape="id20" draw:start-glue-point="6" draw:end-shape="id21" draw:end-glue-point="4" svg:d="M29452 11972l-17 794" svg:viewBox="0 0 18 795">
          <text:p/>
        </draw:connector>
        <draw:connector draw:style-name="gr65" draw:text-style-name="P4" draw:layer="layout" draw:type="line" svg:x1="29.435cm" svg:y1="14.42cm" svg:x2="29.386cm" svg:y2="15.544cm" draw:start-shape="id21" draw:start-glue-point="6" draw:end-shape="id22" draw:end-glue-point="4" svg:d="M29435 14420l-49 1124" svg:viewBox="0 0 50 1125">
          <text:p/>
        </draw:connector>
        <draw:connector draw:style-name="gr66" draw:text-style-name="P4" draw:layer="layout" draw:type="line" svg:x1="31.519cm" svg:y1="16.834cm" svg:x2="34.595cm" svg:y2="16.819cm" draw:start-shape="id22" draw:start-glue-point="7" draw:end-shape="id23" draw:end-glue-point="5" svg:d="M31519 16834l3076-15" svg:viewBox="0 0 3077 16">
          <text:p text:style-name="P1">no</text:p>
        </draw:connector>
        <draw:connector draw:style-name="gr67" draw:text-style-name="P4" draw:layer="layout" draw:type="line" svg:x1="29.386cm" svg:y1="18.123cm" svg:x2="29.419cm" svg:y2="19.58cm" draw:start-shape="id22" draw:start-glue-point="6" draw:end-shape="id24" draw:end-glue-point="4" svg:d="M29386 18123l33 1457" svg:viewBox="0 0 34 1458">
          <text:p text:style-name="P1">yes</text:p>
        </draw:connector>
        <draw:connector draw:style-name="gr68" draw:text-style-name="P4" draw:layer="layout" svg:x1="36.761cm" svg:y1="15.744cm" svg:x2="29.386cm" svg:y2="15.544cm" draw:start-shape="id23" draw:start-glue-point="4" draw:end-shape="id22" draw:end-glue-point="4" svg:d="M36761 15744v-702h-7375v502" svg:viewBox="0 0 7376 7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0:22:38.729944100</meta:creation-date>
    <dc:date>2026-06-21T16:57:09.238772400</dc:date>
    <meta:editing-duration>PT2H58M38S</meta:editing-duration>
    <meta:editing-cycles>25</meta:editing-cycles>
    <meta:generator>LibreOffice/25.8.7.3$Windows_X86_64 LibreOffice_project/30742500f2d3eb4366ac312fa33d3dcabdb3eba5</meta:generator>
    <meta:document-statistic meta:object-count="80"/>
  </office:meta>
</office:document-meta>
</file>